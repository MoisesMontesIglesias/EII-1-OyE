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8pt" style:font-size-asian="18pt" style:font-size-complex="18pt"/>
    </style:style>
    <style:style style:name="P2" style:parent-style-name="Normal" style:family="paragraph">
      <style:text-properties fo:font-size="14pt" style:font-size-asian="14pt" style:font-size-complex="14pt"/>
    </style:style>
    <style:style style:name="T3" style:parent-style-name="Fuentedepárrafopredeter." style:family="text">
      <style:text-properties style:font-name="Cambria Math" style:font-name-complex="Cambria Math"/>
    </style:style>
    <style:style style:name="T4" style:parent-style-name="Fuentedepárrafopredeter." style:family="text">
      <style:text-properties style:font-name="Cambria Math" style:font-name-complex="Cambria Math"/>
    </style:style>
    <style:style style:name="T5" style:parent-style-name="Fuentedepárrafopredeter." style:family="text">
      <style:text-properties style:font-name="Cambria Math" style:font-name-complex="Cambria Math"/>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text-properties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paragraph-properties>
        <style:tab-stops>
          <style:tab-stop style:type="left" style:position="2.1562in"/>
        </style:tab-stops>
      </style:paragraph-properties>
    </style:style>
  </office:automatic-styles>
  <office:body>
    <office:text text:use-soft-page-breaks="true">
      <text:p text:style-name="P1">Presentación ondas</text:p>
      <text:p text:style-name="P2">FUNDAMENTO TEÓRICO</text:p>
      <text:p text:style-name="Normal">En presencia de un campo magnético B, sobre una carga q que se mueve con una velocidad<text:s/><text:span text:style-name="T3">𝑣</text:span><text:s/>actúa una<text:s/><text:span text:style-name="T4">fuerza.</text:span></text:p>
      <text:p text:style-name="Normal">En un hilo conductor, la velocidad de los conductores de carga viene dada por la corriente eléctrica que fluye por el hilo: donde es la<text:s/><text:span text:style-name="T5">𝐿</text:span><text:s/>longitud del hilo.<text:s/></text:p>
      <text:p text:style-name="Normal">El ángulo que forman B y L. En nuestro caso, siempre el ángulo θ=90º, pues B y L son perpendiculares, por lo que F=LIB. pudiendo por tanto estudiar de forma completa la interacción entre un hilo por el que circula una corriente y un campo magnético.<text:s/></text:p>
      <text:p text:style-name="Normal">Al aplicar una corriente, se ejerce una fuerza una fuerza sobre los imanes (igual y de signo opuesto a la ejercida sobre el hilo de corriente).<text:s/></text:p>
      <text:p text:style-name="Normal"/>
      <text:p text:style-name="P6">Materiales y procedimiento experimental</text:p>
      <text:p text:style-name="Normal">- Fuente de alimentación (generador de corriente continua): máquina que produce tensión. En nuestro caso, será el encargado de alimentar los circuitos.</text:p>
      <text:p text:style-name="Normal">- Balanza: en nuestro caso, será el instrumento para medir la fuerza del imán (± 0.01g).<text:s/></text:p>
      <text:p text:style-name="Normal">- Soporte fijo: en nuestro caso, instrumento que sujeta al circuito y le transmite el potencial suministrado por el generador.</text:p>
      <text:p text:style-name="Normal">- Circuitos: en nuestro caso, una serie de conductores rectilíneos impresos en un material aislante.</text:p>
      <text:p text:style-name="Normal">- Imán: en nuestro caso, el elemento encargado de crear el campo magnético.</text:p>
      <text:p text:style-name="Normal"/>
      <text:p text:style-name="P7">PROCEDIMIENTO PARA LA PRÁCTICA</text:p>
      <text:p text:style-name="Normal">Colocamos encima de una balanza el imán sobre el que posicionaremos el circuito. Mediante el uso del soporte fijo, sujetaremos el circuito en un punto intermedio entre los polos del imán donde no tocaremos con el circuito en ningún momento el imán.</text:p>
      <text:p text:style-name="Normal">Para hallar diferentes valores solo debemos cambiar la corriente generada por la fuente de alimentación y los circuitos sujetados por el soporte.</text:p>
      <text:p text:style-name="Normal"/>
      <text:p text:style-name="P8"/>
      <text:p text:style-name="P9"/>
      <text:p text:style-name="P10"/>
      <text:p text:style-name="P11"/>
      <text:soft-page-break/>
      <text:p text:style-name="P12">ANALISIS. FUERZA EN FUNCIÓN DE LA CORRIENTE. CÁLCULO DEL CAMPO MAGNÉTICO.</text:p>
      <text:p text:style-name="Normal">Buscamos verificar que la fuerza sobre una corriente es proporcional a la corriente.<text:s/></text:p>
      <text:p text:style-name="Normal">Esta gráfica representa la medición de la fuerza magnética en intervalos de 0,5 A.</text:p>
      <text:p text:style-name="Normal">Ajustamos los valores mediante una regresión lineal, obteniendo: m, n y sus respectivos errores.</text:p>
      <text:p text:style-name="Normal">Finalmente, por fórmula (B = m/L), hallamos el valor del campo magnético, para posteriormente, a partir de la teoría de errores, calcular el error del campo magnético.</text:p>
      <text:p text:style-name="Normal"/>
      <text:p text:style-name="P13">ANALISIS. FUERZA EN FUNCIÓN DE LA LONGITUD. MEDIDA DEL CAMPO MAGNÉTICO.</text:p>
      <text:p text:style-name="Normal">Buscamos verificar que la fuerza sobre una corriente es proporcional a su longitud.<text:s/></text:p>
      <text:p text:style-name="Normal">Calculamos la fuerza magnética para cada espira de corriente manteniendo siempre la misma intensidad (2 A).</text:p>
      <text:p text:style-name="Normal">Ajustamos los valores mediante una regresión lineal, obteniendo: m, n y sus respectivos errores.</text:p>
      <text:p text:style-name="Normal">Finalmente, por fórmula (B = m/L), hallamos el valor del campo magnético, para posteriormente, a partir de la teoría de errores, calcular el error del campo magnético.</text:p>
      <text:p text:style-name="Normal">Dato a tener en cuenta: La longitud efectiva es 2mm menos en conductores sencillos y 4 mm en los dobles</text:p>
      <text:p text:style-name="Normal"/>
      <text:p text:style-name="P14">CONCLUSIONES</text:p>
      <text:p text:style-name="Normal">Observamos que, tanto al aumentar la intensidad como al aumentar la longitud del condensador, se produce un aumento en el peso y, por consiguiente, en la fuerza, siendo esta cero ya que no presenta<text:s/>corriente.</text:p>
      <text:p text:style-name="Normal"/>
      <text:p text:style-name="Normal"/>
      <text:p text:style-name="Normal"/>
      <text:p text:style-name="Normal"/>
      <text:p text:style-name="Normal"/>
      <text:p text:style-name="P15"><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ises Montes Iglesias</meta:initial-creator>
    <dc:creator>Moises Montes Iglesias</dc:creator>
    <meta:creation-date>2023-04-24T13:43:00Z</meta:creation-date>
    <dc:date>2023-04-24T16:32:00Z</dc:date>
    <meta:template xlink:href="Normal.dotm" xlink:type="simple"/>
    <meta:editing-cycles>5</meta:editing-cycles>
    <meta:editing-duration>PT10140S</meta:editing-duration>
    <meta:document-statistic meta:page-count="2" meta:paragraph-count="6" meta:word-count="475" meta:character-count="3087" meta:row-count="21" meta:non-whitespace-character-count="2618"/>
  </office:meta>
</office:document-meta>
</file>